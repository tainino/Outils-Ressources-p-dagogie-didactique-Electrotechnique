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ianne" svg:font-family="Marianne" style:font-family-generic="modern" style:font-pitch="variable"/>
    <style:font-face style:name="Marianne ExtraBold" svg:font-family="'Marianne ExtraBold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A3" style:family="table-cell">
      <style:table-cell-properties fo:padding="0.097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291cm" style:rel-column-width="4453*"/>
    </style:style>
    <style:style style:name="Tableau2.B" style:family="table-column">
      <style:table-column-properties style:column-width="13.61cm" style:rel-column-width="46942*"/>
    </style:style>
    <style:style style:name="Tableau2.C" style:family="table-column">
      <style:table-column-properties style:column-width="4.099cm" style:rel-column-width="14140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3" style:family="table-row">
      <style:table-row-properties style:min-row-height="3.29cm"/>
    </style:style>
    <style:style style:name="Tableau2.4" style:family="table-row">
      <style:table-row-properties style:min-row-height="4.027cm"/>
    </style:style>
    <style:style style:name="Tableau2.C5" style:family="table-cell">
      <style:table-cell-properties fo:padding="0.097cm" fo:border-left="0.5pt solid #000000" fo:border-right="0.5pt solid #000000" fo:border-top="none" fo:border-bottom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end" style:justify-single-word="false"/>
      <style:text-properties style:font-name="Marianne ExtraBold" fo:font-size="15pt" officeooo:rsid="00050173" officeooo:paragraph-rsid="00050173" style:font-size-asian="13.1000003814697pt" style:font-size-complex="15pt"/>
    </style:style>
    <style:style style:name="P2" style:family="paragraph" style:parent-style-name="Standard">
      <style:paragraph-properties fo:text-align="end" style:justify-single-word="false"/>
      <style:text-properties style:font-name="Marianne ExtraBold" fo:font-size="15pt" officeooo:rsid="00050173" officeooo:paragraph-rsid="00050173" style:font-size-asian="15pt" style:font-size-complex="15pt"/>
    </style:style>
    <style:style style:name="P3" style:family="paragraph">
      <loext:graphic-properties draw:fill="none"/>
      <style:text-properties fo:font-size="12pt"/>
    </style:style>
    <style:style style:name="P4" style:family="paragraph" style:parent-style-name="Standard">
      <style:text-properties style:font-name="Marianne" fo:font-size="15pt" style:font-size-asian="13.1000003814697pt" style:font-size-complex="15pt"/>
    </style:style>
    <style:style style:name="P5" style:family="paragraph">
      <style:paragraph-properties fo:text-align="center"/>
      <style:text-properties fo:color="#ffffff" fo:font-family="Arial" style:font-style-name="Normal" style:font-family-generic="swiss" fo:font-size="6pt" fo:font-style="italic" fo:font-weight="bold"/>
    </style:style>
    <style:style style:name="P6" style:family="paragraph" style:parent-style-name="Standard">
      <style:text-properties style:font-name="Marianne" fo:font-weight="bold" officeooo:paragraph-rsid="000b7e5a" style:font-weight-asian="bold" style:font-weight-complex="bold"/>
    </style:style>
    <style:style style:name="P7" style:family="paragraph">
      <style:paragraph-properties fo:text-align="start"/>
      <style:text-properties style:text-line-through-style="none" style:text-line-through-type="none" fo:font-family="Arial" style:font-style-name="Normal" style:font-family-generic="swiss" fo:font-size="9pt" fo:font-style="normal" style:text-underline-style="none"/>
    </style:style>
    <style:style style:name="P8" style:family="paragraph" style:parent-style-name="Table_20_Contents">
      <style:paragraph-properties fo:line-height="150%"/>
      <style:text-properties style:font-name="Marianne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text-line-through-type="none" fo:font-family="Arial" style:font-style-name="Normal" style:font-family-generic="swiss" fo:font-style="italic" style:text-underline-style="none"/>
    </style:style>
    <style:style style:name="P10" style:family="paragraph" style:parent-style-name="Table_20_Contents">
      <style:text-properties style:font-name="Marianne" fo:font-size="8pt" style:text-underline-style="solid" style:text-underline-width="auto" style:text-underline-color="font-color" fo:font-weight="bold" officeooo:rsid="000323ce" officeooo:paragraph-rsid="000323ce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Marianne" fo:font-size="8pt" officeooo:rsid="000323ce" officeooo:paragraph-rsid="000856a9" style:font-size-asian="8pt" style:font-size-complex="8pt"/>
    </style:style>
    <style:style style:name="P12" style:family="paragraph" style:parent-style-name="Standard">
      <style:text-properties style:font-name="Marianne" fo:font-size="8pt" style:text-underline-style="solid" style:text-underline-width="auto" style:text-underline-color="font-color" fo:font-weight="bold" officeooo:rsid="000323ce" officeooo:paragraph-rsid="000dce3b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Marianne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Marianne" fo:font-size="8pt" style:text-underline-style="solid" style:text-underline-width="auto" style:text-underline-color="font-color" fo:font-weight="bold" officeooo:paragraph-rsid="001c4b69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Marianne" fo:font-size="8pt" style:text-underline-style="solid" style:text-underline-width="auto" style:text-underline-color="font-color" fo:font-weight="bold" officeooo:rsid="000323ce" officeooo:paragraph-rsid="001c4b69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line-height="150%"/>
      <style:text-properties style:font-name="Marianne" fo:font-size="8pt" style:text-underline-style="solid" style:text-underline-width="auto" style:text-underline-color="font-color" fo:font-weight="bold" officeooo:paragraph-rsid="000dce3b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Marianne ExtraBold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Marianne" fo:font-size="8pt" officeooo:rsid="000323ce" officeooo:paragraph-rsid="000323c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Marianne" fo:font-size="10pt" fo:font-weight="bold" officeooo:rsid="000323ce" officeooo:paragraph-rsid="000323ce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style:font-name="Marianne" fo:font-size="10pt" fo:font-style="normal" style:text-underline-style="solid" style:text-underline-width="auto" style:text-underline-color="font-color" fo:font-weight="bold" officeooo:rsid="000323ce" officeooo:paragraph-rsid="000323ce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style:font-name="Marianne" officeooo:paragraph-rsid="0023e460"/>
    </style:style>
    <style:style style:name="P22" style:family="paragraph">
      <style:paragraph-properties fo:text-align="start"/>
      <style:text-properties style:text-line-through-style="none" style:text-line-through-type="none" fo:font-family="Arial" style:font-style-name="Normal" style:font-family-generic="swiss" fo:font-style="normal" style:text-underline-style="none"/>
    </style:style>
    <style:style style:name="P23" style:family="paragraph" style:parent-style-name="Standard">
      <style:text-properties style:font-name="Marianne" officeooo:paragraph-rsid="000856a9"/>
    </style:style>
    <style:style style:name="P24" style:family="paragraph">
      <style:paragraph-properties fo:text-align="start"/>
      <style:text-properties style:text-line-through-style="none" style:text-line-through-type="none" fo:font-family="Arial" style:font-style-name="Normal" style:font-family-generic="swiss" fo:font-style="normal" style:text-underline-style="none" fo:font-weight="bold"/>
    </style:style>
    <style:style style:name="P25" style:family="paragraph" style:parent-style-name="Standard">
      <style:text-properties style:font-name="Marianne" officeooo:paragraph-rsid="000b7e5a"/>
    </style:style>
    <style:style style:name="P26" style:family="paragraph" style:parent-style-name="Standard">
      <style:text-properties style:font-name="Marianne" officeooo:paragraph-rsid="000cf0a9"/>
    </style:style>
    <style:style style:name="P27" style:family="paragraph" style:parent-style-name="Standard">
      <style:text-properties style:font-name="Marianne" officeooo:paragraph-rsid="000f35b1"/>
    </style:style>
    <style:style style:name="P28" style:family="paragraph" style:parent-style-name="Standard">
      <style:text-properties style:font-name="Marianne" fo:font-size="10pt" fo:font-style="normal" style:text-underline-style="solid" style:text-underline-width="auto" style:text-underline-color="font-color" fo:font-weight="bold" officeooo:rsid="000323ce" officeooo:paragraph-rsid="000856a9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text-properties style:font-name="Marianne" fo:font-size="10pt" style:text-underline-style="solid" style:text-underline-width="auto" style:text-underline-color="font-color" fo:font-weight="bold" officeooo:rsid="000323ce" officeooo:paragraph-rsid="000323ce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Marianne" fo:font-size="10pt" style:text-underline-style="solid" style:text-underline-width="auto" style:text-underline-color="font-color" fo:font-weight="bold" officeooo:rsid="000323ce" officeooo:paragraph-rsid="000dce3b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Mariann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arianne" fo:font-size="10pt" style:text-underline-style="solid" style:text-underline-width="auto" style:text-underline-color="font-color" fo:font-weight="bold" officeooo:paragraph-rsid="000dce3b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Marianne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Marianne" fo:font-size="8pt" fo:font-weight="normal" officeooo:paragraph-rsid="0014fcb1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Marianne" fo:font-size="6pt" style:font-size-asian="5.25pt" style:font-size-complex="6pt"/>
    </style:style>
    <style:style style:name="P36" style:family="paragraph" style:parent-style-name="Table_20_Contents">
      <style:text-properties style:font-name="Marianne" fo:font-size="10pt" style:text-underline-style="solid" style:text-underline-width="auto" style:text-underline-color="font-color" fo:font-weight="bold" officeooo:rsid="00050173" officeooo:paragraph-rsid="00050173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.101cm" fo:margin-bottom="0.101cm" style:contextual-spacing="false"/>
      <style:text-properties style:font-name="Marianne" fo:font-size="10pt" style:text-underline-style="solid" style:text-underline-width="auto" style:text-underline-color="font-color" fo:font-weight="bold" officeooo:rsid="00050173" officeooo:paragraph-rsid="000856a9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Marianne" fo:font-size="2pt" style:font-size-asian="1.75pt" style:font-size-complex="2pt"/>
    </style:style>
    <style:style style:name="T1" style:family="text">
      <style:text-properties fo:font-size="10pt" officeooo:rsid="000323ce" style:font-size-asian="10pt" style:font-size-complex="10pt"/>
    </style:style>
    <style:style style:name="T2" style:family="text">
      <style:text-properties fo:font-size="10pt" officeooo:rsid="000985f4" style:font-size-asian="10pt" style:font-size-complex="10pt"/>
    </style:style>
    <style:style style:name="T3" style:family="text">
      <style:text-properties officeooo:rsid="000323ce"/>
    </style:style>
    <style:style style:name="T4" style:family="text">
      <style:text-properties style:text-underline-style="none" fo:font-weight="normal" officeooo:rsid="000323ce" style:font-weight-asian="normal" style:font-weight-complex="normal"/>
    </style:style>
    <style:style style:name="T5" style:family="text">
      <style:text-properties officeooo:rsid="000f35b1"/>
    </style:style>
    <style:style style:name="gr1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background"/>
    </style:style>
    <style:style style:name="gr3" style:family="graphic">
      <style:graphic-properties draw:stroke="solid" svg:stroke-width="0.106cm" svg:stroke-color="#000091" svg:stroke-opacity="100%" draw:stroke-linejoin="miter" svg:stroke-linecap="butt" draw:fill="none" fo:padding-top="0.035cm" fo:padding-bottom="0.035cm" fo:padding-left="0.035cm" fo:padding-right="0.035cm" loext:decorative="false" style:run-through="background"/>
    </style:style>
    <style:style style:name="gr4" style:family="graphic">
      <style:graphic-properties draw:textarea-vertical-align="middle" fo:background-color="#fa9293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fo:background-color="#afd095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fo:border="solid #ffffff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Dans quelle séquence je travail ?" form:control-implementation="ooo:com.sun.star.form.component.TextField" xml:id="control1" form:id="control1" form:tab-stop="false" form:current-value="Dans quelle séquence je travail ?" form:value="Dans quelle séquence je travail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dividuel / Binôme / Groupe PAP / PAI / PPS" form:control-implementation="ooo:com.sun.star.form.component.TextField" xml:id="control2" form:id="control2" form:tab-stop="false" form:current-value="Individuel / Binôme / Groupe PAP / PAI / PPS" form:value="Individuel / Binôme / Groupe PAP / PAI / PP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tour sur la séance" form:control-implementation="ooo:com.sun.star.form.component.TextField" xml:id="control3" form:id="control3" form:tab-stop="false" form:current-value="Feedback sur la séance : ce qui s’est bien passé et ce qu’il faut changer ?" form:value="Feedback sur la séance : ce qui s’est bien passé et ce qu’il faut changer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tre d'activité" form:control-implementation="ooo:com.sun.star.form.component.TextField" xml:id="control4" form:id="control4" form:tab-stop="false" form:current-value="Titre d'activité" form:value="Titre d'activité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ntervenants" form:control-implementation="ooo:com.sun.star.form.component.TextField" xml:id="control5" form:id="control5" form:tab-stop="false" form:current-value="Mr.Bigel" form:value="Mr.Bige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Classe" form:control-implementation="ooo:com.sun.star.form.component.TextField" xml:id="control6" form:id="control6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Detail de l'activité" form:control-implementation="ooo:com.sun.star.form.component.TextField" xml:id="control7" form:id="control7" form:tab-stop="false" form:current-value="Detail de l'activité" form:value="Detail de l'activité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1" form:control-implementation="ooo:com.sun.star.form.component.TextField" xml:id="control8" form:id="control8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uel référentiel ?" form:control-implementation="ooo:com.sun.star.form.component.TextField" xml:id="control9" form:id="control9" form:tab-stop="false" form:current-value="Quel référentiel ?" form:value="Quel référentiel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uel thème, quel domaine ?" form:control-implementation="ooo:com.sun.star.form.component.TextField" xml:id="control10" form:id="control10" form:tab-stop="false" form:current-value="Quel thème, quel domaine ?" form:value="Quel thème, quel domaine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uel est l’objectif de la séquence, qu’est ce qu’ils doivent avoir retenu ?" form:control-implementation="ooo:com.sun.star.form.component.TextField" xml:id="control11" form:id="control11" form:tab-stop="false" form:current-value="Quel est l’objectif de la séquence, qu’est ce qu’ils doivent avoir retenu ?" form:value="Quel est l’objectif de la séquence, qu’est ce qu’ils doivent avoir retenu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uelle pré-requis ?" form:control-implementation="ooo:com.sun.star.form.component.TextField" xml:id="control12" form:id="control12" form:tab-stop="false" form:current-value="Quelle pré-requis ?" form:value="Quelle pré-requis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2" form:control-implementation="ooo:com.sun.star.form.component.TextField" xml:id="control13" form:id="control13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3" form:control-implementation="ooo:com.sun.star.form.component.TextField" xml:id="control14" form:id="control14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4" form:control-implementation="ooo:com.sun.star.form.component.TextField" xml:id="control15" form:id="control15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5" form:control-implementation="ooo:com.sun.star.form.component.TextField" xml:id="control16" form:id="control16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6" form:control-implementation="ooo:com.sun.star.form.component.TextField" xml:id="control17" form:id="control17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7" form:control-implementation="ooo:com.sun.star.form.component.TextField" xml:id="control18" form:id="control18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ien8" form:control-implementation="ooo:com.sun.star.form.component.TextField" xml:id="control19" form:id="control19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ans quelle salle, quelle matérielle ?" form:control-implementation="ooo:com.sun.star.form.component.TextField" xml:id="control20" form:id="control20" form:tab-stop="false" form:current-value="Dans quelle salle, quelle matérielle ?" form:value="Dans quelle salle, quelle matérielle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mps26" form:control-implementation="ooo:com.sun.star.form.component.TextField" xml:id="control21" form:id="control2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Dans quelle séance je travail, quelle compétences ?" form:control-implementation="ooo:com.sun.star.form.component.TextField" xml:id="control22" form:id="control22" form:tab-stop="false" form:current-value="Dans quelle séance je travail, quelle compétences ?" form:value="Dans quelle séance je travail, quelle compétences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uel est l’objectif de la séance, qu’est ce qu’ils doivent avoir retenu ?" form:control-implementation="ooo:com.sun.star.form.component.TextField" xml:id="control23" form:id="control23" form:tab-stop="false" form:current-value="Quel est l’objectif de la séance, qu’est ce qu’ils doivent avoir retenu ?" form:value="Quel est l’objectif de la séance, qu’est ce qu’ils doivent avoir retenu ?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button form:name="Bouton 1" form:control-implementation="ooo:com.sun.star.form.component.CommandButton" xml:id="control24" form:id="control24" form:label="Tout réinitialiser" form:button-type="reset" office:target-frame="" form:default-button="tru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C:/Users/antoi/Desktop/Fiche%20prep%20bigel.odt/content.xml"/>
            </form:properties>
          </form:button>
          <form:text form:name="Temps1" form:control-implementation="ooo:com.sun.star.form.component.TextField" xml:id="control25" form:id="control25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" form:control-implementation="ooo:com.sun.star.form.component.TextField" xml:id="control26" form:id="control26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3" form:control-implementation="ooo:com.sun.star.form.component.TextField" xml:id="control27" form:id="control27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4" form:control-implementation="ooo:com.sun.star.form.component.TextField" xml:id="control28" form:id="control28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5" form:control-implementation="ooo:com.sun.star.form.component.TextField" xml:id="control29" form:id="control29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6" form:control-implementation="ooo:com.sun.star.form.component.TextField" xml:id="control30" form:id="control30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7" form:control-implementation="ooo:com.sun.star.form.component.TextField" xml:id="control31" form:id="control3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8" form:control-implementation="ooo:com.sun.star.form.component.TextField" xml:id="control32" form:id="control32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9" form:control-implementation="ooo:com.sun.star.form.component.TextField" xml:id="control33" form:id="control33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0" form:control-implementation="ooo:com.sun.star.form.component.TextField" xml:id="control34" form:id="control34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1" form:control-implementation="ooo:com.sun.star.form.component.TextField" xml:id="control35" form:id="control35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2" form:control-implementation="ooo:com.sun.star.form.component.TextField" xml:id="control36" form:id="control36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3" form:control-implementation="ooo:com.sun.star.form.component.TextField" xml:id="control37" form:id="control37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4" form:control-implementation="ooo:com.sun.star.form.component.TextField" xml:id="control38" form:id="control38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5" form:control-implementation="ooo:com.sun.star.form.component.TextField" xml:id="control39" form:id="control39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6" form:control-implementation="ooo:com.sun.star.form.component.TextField" xml:id="control40" form:id="control40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7" form:control-implementation="ooo:com.sun.star.form.component.TextField" xml:id="control41" form:id="control4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8" form:control-implementation="ooo:com.sun.star.form.component.TextField" xml:id="control42" form:id="control42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19" form:control-implementation="ooo:com.sun.star.form.component.TextField" xml:id="control43" form:id="control43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0" form:control-implementation="ooo:com.sun.star.form.component.TextField" xml:id="control44" form:id="control44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1" form:control-implementation="ooo:com.sun.star.form.component.TextField" xml:id="control45" form:id="control45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5" form:control-implementation="ooo:com.sun.star.form.component.TextField" xml:id="control46" form:id="control46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2" form:control-implementation="ooo:com.sun.star.form.component.TextField" xml:id="control47" form:id="control47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3" form:control-implementation="ooo:com.sun.star.form.component.TextField" xml:id="control48" form:id="control48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Temps24" form:control-implementation="ooo:com.sun.star.form.component.TextField" xml:id="control49" form:id="control49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button form:name="Bouton 2" form:control-implementation="ooo:com.sun.star.form.component.CommandButton" xml:id="control50" form:id="control50" form:label="Exporter PDF" office:target-frame="" form:default-button="tru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C:/Users/antoi/Desktop/Fiche%20prep%20bigel.odt/content.xml"/>
            </form:properties>
            <office:event-listeners>
              <script:event-listener script:language="ooo:script" script:event-name="form:performaction" xlink:href="vnd.sun.star.script:Standard.export.ExporterPDF?language=Basic&amp;location=application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g text:anchor-type="paragraph" draw:z-index="0" draw:name="Groupe 4" draw:style-name="gr1"><draw:g draw:name="Groupe 3" draw:style-name="gr2"><draw:connector draw:name="Connecteur droit 2" draw:style-name="gr3" draw:text-style-name="P3" draw:type="line" svg:x1="15.194cm" svg:y1="0.786cm" svg:x2="19.041cm" svg:y2="0.786cm" svg:d="M15194 786h3847" svg:viewBox="0 0 3849 2"><text:p/></draw:connector><draw:connector draw:name="Connecteur droit 3" draw:style-name="gr3" draw:text-style-name="P3" draw:type="line" svg:x1="15.227cm" svg:y1="0.758cm" svg:x2="15.227cm" svg:y2="1.088cm" svg:d="M15227 758v330" svg:viewBox="0 0 2 332"><text:p/></draw:connector></draw:g><draw:g draw:name="Groupe 5" draw:style-name="gr2"><draw:connector draw:name="Connecteur droit 4" draw:style-name="gr3" draw:text-style-name="P3" draw:type="line" svg:x1="10.188cm" svg:y1="-0.096cm" svg:x2="13.578cm" svg:y2="-0.096cm" svg:d="M10188-96h3390" svg:viewBox="0 0 3392 2"><text:p/></draw:connector><draw:connector draw:name="Connecteur droit 5" draw:style-name="gr3" draw:text-style-name="P3" draw:type="line" svg:x1="13.539cm" svg:y1="-0.406cm" svg:x2="13.539cm" svg:y2="-0.076cm" svg:d="M13539-406v330" svg:viewBox="0 0 2 332"><text:p/></draw:connector></draw:g></draw:g>FICHE PRÉPARATION DE SÉANCE</text:p>
      <text:p text:style-name="P4"><draw:control text:anchor-type="paragraph" draw:z-index="21" draw:name="Contrôle 48" draw:style-name="gr4" draw:text-style-name="P5" svg:width="1.721cm" svg:height="0.354cm" svg:x="15.328cm" svg:y="0.145cm" draw:control="control24"/><draw:control text:anchor-type="paragraph" draw:z-index="50" draw:name="Contrôle 50" draw:style-name="gr5" draw:text-style-name="P5" svg:width="1.721cm" svg:height="0.354cm" svg:x="17.168cm" svg:y="0.145cm" draw:control="control50"/></text:p>
      <text:p text:style-name="P6"><text:tab/><text:tab/><text:tab/><text:tab/> <text:s text:c="22"/><text:span text:style-name="T1">INTERVENANT.S :</text:span><draw:control text:anchor-type="as-char" svg:y="-0.376cm" draw:z-index="6" draw:name="Contrôle 37" draw:style-name="gr6" draw:text-style-name="P7" svg:width="4.128cm" svg:height="0.6cm" draw:control="control5"/><text:span text:style-name="T2">C</text:span><text:span text:style-name="T1">LASSE :</text:span><text:span text:style-name="T1"><draw:control text:anchor-type="as-char" svg:y="-0.376cm" draw:z-index="7" draw:name="Contrôle 38" draw:style-name="gr6" draw:text-style-name="P7" svg:width="2.555cm" svg:height="0.6cm" draw:control="control6"/></text:span></text:p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8">R<text:span text:style-name="T3">éférentiel :</text:span><text:span text:style-name="T4"> <text:s/></text:span><draw:control text:anchor-type="as-char" svg:y="-0.298cm" draw:z-index="1" draw:name="Contrôle 1" draw:style-name="gr6" draw:text-style-name="P9" svg:width="4.201cm" svg:height="0.496cm" draw:control="control9"/></text:p>
          </table:table-cell>
          <table:table-cell table:style-name="Tableau1.A1" table:number-rows-spanned="3" office:value-type="string">
            <text:p text:style-name="P10">Séquence :</text:p>
            <text:p text:style-name="P11"><draw:control text:anchor-type="as-char" svg:y="-0.328cm" draw:z-index="2" draw:name="Contrôle 3" draw:style-name="gr6" draw:text-style-name="P9" svg:width="6.139cm" svg:height="1.049cm" draw:control="control1"/></text:p>
            <text:p text:style-name="P10">Objectif :</text:p>
            <text:p text:style-name="P12"><draw:control text:anchor-type="as-char" svg:y="-0.328cm" draw:z-index="11" draw:name="Contrôle 4" draw:style-name="gr6" draw:text-style-name="P9" svg:width="6.139cm" svg:height="1.019cm" draw:control="control11"/></text:p>
          </table:table-cell>
          <table:table-cell table:style-name="Tableau1.C1" table:number-rows-spanned="3" office:value-type="string">
            <text:p text:style-name="P13">S<text:span text:style-name="T3">éance :</text:span></text:p>
            <text:p text:style-name="P14"><draw:control text:anchor-type="as-char" svg:y="-0.328cm" draw:z-index="23" draw:name="Contrôle 5" draw:style-name="gr6" draw:text-style-name="P9" svg:width="6.139cm" svg:height="1.049cm" draw:control="control22"/><text:span text:style-name="T3">Objectif :</text:span></text:p>
            <text:p text:style-name="P15"><draw:control text:anchor-type="as-char" svg:y="-0.328cm" draw:z-index="24" draw:name="Contrôle 47" draw:style-name="gr6" draw:text-style-name="P9" svg:width="6.139cm" svg:height="1.019cm" draw:control="control23"/></text:p>
          </table:table-cell>
        </table:table-row>
        <table:table-row>
          <table:table-cell table:style-name="Tableau1.A2" office:value-type="string">
            <text:p text:style-name="P16">D<text:span text:style-name="T3">omaine :</text:span><text:span text:style-name="T4"> </text:span><text:span text:style-name="T4"><draw:control text:anchor-type="as-char" svg:y="-0.298cm" draw:z-index="10" draw:name="Contrôle 2" draw:style-name="gr6" draw:text-style-name="P9" svg:width="4.597cm" svg:height="0.496cm" draw:control="control10"/></text:span></text:p>
          </table:table-cell>
          <table:covered-table-cell table:style-name="Tableau1.A1"/>
          <table:covered-table-cell table:style-name="Tableau1.C1"/>
        </table:table-row>
        <table:table-row>
          <table:table-cell table:style-name="Tableau1.A3" office:value-type="string">
            <text:p text:style-name="P13"/>
          </table:table-cell>
          <table:covered-table-cell table:style-name="Tableau1.A1"/>
          <table:covered-table-cell table:style-name="Tableau1.C1"/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17">S<text:span text:style-name="T3">CENARIO DE LA SÉANCE</text:span>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18">Temps</text:p>
          </table:table-cell>
          <table:table-cell table:style-name="Tableau2.A2" office:value-type="string">
            <text:p text:style-name="P19">Activité / Apports / Contenu</text:p>
          </table:table-cell>
          <table:table-cell table:style-name="Tableau2.C2" office:value-type="string">
            <text:p text:style-name="P20"/>
          </table:table-cell>
        </table:table-row>
        <table:table-row table:style-name="Tableau2.3">
          <table:table-cell table:style-name="Tableau2.A2" table:number-rows-spanned="3" office:value-type="string">
            <text:p text:style-name="P21"><draw:control text:anchor-type="as-char" svg:y="-0.328cm" draw:z-index="25" draw:name="Contrôle 10" draw:style-name="gr6" draw:text-style-name="P22" svg:width="1.091cm" svg:height="0.518cm" draw:control="control25"/><draw:control text:anchor-type="as-char" svg:y="-0.328cm" draw:z-index="26" draw:name="Contrôle 11" draw:style-name="gr6" draw:text-style-name="P22" svg:width="1.091cm" svg:height="0.518cm" draw:control="control26"/><draw:control text:anchor-type="as-char" svg:y="-0.328cm" draw:z-index="27" draw:name="Contrôle 12" draw:style-name="gr6" draw:text-style-name="P22" svg:width="1.091cm" svg:height="0.518cm" draw:control="control27"/><draw:control text:anchor-type="as-char" svg:y="-0.328cm" draw:z-index="28" draw:name="Contrôle 13" draw:style-name="gr6" draw:text-style-name="P22" svg:width="1.091cm" svg:height="0.518cm" draw:control="control28"/><draw:control text:anchor-type="as-char" svg:y="-0.328cm" draw:z-index="29" draw:name="Contrôle 14" draw:style-name="gr6" draw:text-style-name="P22" svg:width="1.091cm" svg:height="0.518cm" draw:control="control29"/><draw:control text:anchor-type="as-char" svg:y="-0.328cm" draw:z-index="30" draw:name="Contrôle 15" draw:style-name="gr6" draw:text-style-name="P22" svg:width="1.091cm" svg:height="0.518cm" draw:control="control30"/><draw:control text:anchor-type="as-char" svg:y="-0.328cm" draw:z-index="31" draw:name="Contrôle 16" draw:style-name="gr6" draw:text-style-name="P22" svg:width="1.091cm" svg:height="0.518cm" draw:control="control31"/><draw:control text:anchor-type="as-char" svg:y="-0.328cm" draw:z-index="32" draw:name="Contrôle 17" draw:style-name="gr6" draw:text-style-name="P22" svg:width="1.091cm" svg:height="0.518cm" draw:control="control32"/><draw:control text:anchor-type="as-char" svg:y="-0.328cm" draw:z-index="33" draw:name="Contrôle 18" draw:style-name="gr6" draw:text-style-name="P22" svg:width="1.091cm" svg:height="0.518cm" draw:control="control33"/><draw:control text:anchor-type="as-char" svg:y="-0.328cm" draw:z-index="34" draw:name="Contrôle 19" draw:style-name="gr6" draw:text-style-name="P22" svg:width="1.091cm" svg:height="0.518cm" draw:control="control34"/><draw:control text:anchor-type="as-char" svg:y="-0.328cm" draw:z-index="35" draw:name="Contrôle 20" draw:style-name="gr6" draw:text-style-name="P22" svg:width="1.091cm" svg:height="0.518cm" draw:control="control35"/><draw:control text:anchor-type="as-char" svg:y="-0.328cm" draw:z-index="36" draw:name="Contrôle 21" draw:style-name="gr6" draw:text-style-name="P22" svg:width="1.091cm" svg:height="0.518cm" draw:control="control36"/><draw:control text:anchor-type="as-char" svg:y="-0.328cm" draw:z-index="37" draw:name="Contrôle 22" draw:style-name="gr6" draw:text-style-name="P22" svg:width="1.091cm" svg:height="0.518cm" draw:control="control37"/><draw:control text:anchor-type="as-char" svg:y="-0.328cm" draw:z-index="38" draw:name="Contrôle 23" draw:style-name="gr6" draw:text-style-name="P22" svg:width="1.091cm" svg:height="0.518cm" draw:control="control38"/><draw:control text:anchor-type="as-char" svg:y="-0.328cm" draw:z-index="39" draw:name="Contrôle 24" draw:style-name="gr6" draw:text-style-name="P22" svg:width="1.091cm" svg:height="0.518cm" draw:control="control39"/><draw:control text:anchor-type="as-char" svg:y="-0.328cm" draw:z-index="40" draw:name="Contrôle 25" draw:style-name="gr6" draw:text-style-name="P22" svg:width="1.091cm" svg:height="0.518cm" draw:control="control40"/><draw:control text:anchor-type="as-char" svg:y="-0.328cm" draw:z-index="41" draw:name="Contrôle 26" draw:style-name="gr6" draw:text-style-name="P22" svg:width="1.091cm" svg:height="0.518cm" draw:control="control41"/><draw:control text:anchor-type="as-char" svg:y="-0.328cm" draw:z-index="42" draw:name="Contrôle 27" draw:style-name="gr6" draw:text-style-name="P22" svg:width="1.091cm" svg:height="0.518cm" draw:control="control42"/><draw:control text:anchor-type="as-char" svg:y="-0.328cm" draw:z-index="43" draw:name="Contrôle 28" draw:style-name="gr6" draw:text-style-name="P22" svg:width="1.091cm" svg:height="0.518cm" draw:control="control43"/><draw:control text:anchor-type="as-char" svg:y="-0.328cm" draw:z-index="44" draw:name="Contrôle 29" draw:style-name="gr6" draw:text-style-name="P22" svg:width="1.091cm" svg:height="0.518cm" draw:control="control44"/><draw:control text:anchor-type="as-char" svg:y="-0.328cm" draw:z-index="45" draw:name="Contrôle 30" draw:style-name="gr6" draw:text-style-name="P22" svg:width="1.091cm" svg:height="0.518cm" draw:control="control45"/><draw:control text:anchor-type="as-char" svg:y="-0.328cm" draw:z-index="47" draw:name="Contrôle 32" draw:style-name="gr6" draw:text-style-name="P22" svg:width="1.091cm" svg:height="0.518cm" draw:control="control47"/><draw:control text:anchor-type="as-char" svg:y="-0.328cm" draw:z-index="48" draw:name="Contrôle 33" draw:style-name="gr6" draw:text-style-name="P22" svg:width="1.091cm" svg:height="0.518cm" draw:control="control48"/><draw:control text:anchor-type="as-char" svg:y="-0.328cm" draw:z-index="49" draw:name="Contrôle 49" draw:style-name="gr6" draw:text-style-name="P22" svg:width="1.091cm" svg:height="0.518cm" draw:control="control49"/><draw:control text:anchor-type="as-char" svg:y="-0.328cm" draw:z-index="46" draw:name="Contrôle 31" draw:style-name="gr6" draw:text-style-name="P22" svg:width="1.091cm" svg:height="0.518cm" draw:control="control46"/></text:p>
          </table:table-cell>
          <table:table-cell table:style-name="Tableau2.A2" table:number-rows-spanned="4" office:value-type="string">
            <text:p text:style-name="P23"><draw:control text:anchor-type="as-char" svg:y="-0.328cm" draw:z-index="5" draw:name="Contrôle 36" draw:style-name="gr6" draw:text-style-name="P24" svg:width="13.327cm" svg:height="0.518cm" draw:control="control4"/></text:p>
            <text:p text:style-name="P25"><draw:control text:anchor-type="as-char" svg:y="-0.328cm" draw:z-index="8" draw:name="Contrôle 39" draw:style-name="gr6" draw:text-style-name="P9" svg:width="13.327cm" svg:height="2.08cm" draw:control="control7"/></text:p>
            <text:p text:style-name="P26"><draw:control text:anchor-type="as-char" svg:y="-0.328cm" draw:z-index="9" draw:name="Contrôle 40" draw:style-name="gr6" draw:text-style-name="P24" svg:width="13.327cm" svg:height="0.518cm" draw:control="control8"/></text:p>
            <text:p text:style-name="P27"><draw:control text:anchor-type="as-char" svg:y="-0.328cm" draw:z-index="14" draw:name="Contrôle 8" draw:style-name="gr6" draw:text-style-name="P9" svg:width="13.327cm" svg:height="2.08cm" draw:control="control13"/><draw:control text:anchor-type="as-char" svg:y="-0.328cm" draw:z-index="15" draw:name="Contrôle 41" draw:style-name="gr6" draw:text-style-name="P24" svg:width="13.327cm" svg:height="0.518cm" draw:control="control14"/><draw:control text:anchor-type="as-char" svg:y="-0.328cm" draw:z-index="16" draw:name="Contrôle 42" draw:style-name="gr6" draw:text-style-name="P9" svg:width="13.327cm" svg:height="2.08cm" draw:control="control15"/><draw:control text:anchor-type="as-char" svg:y="-0.328cm" draw:z-index="17" draw:name="Contrôle 43" draw:style-name="gr6" draw:text-style-name="P24" svg:width="13.327cm" svg:height="0.518cm" draw:control="control16"/><draw:control text:anchor-type="as-char" svg:y="-0.328cm" draw:z-index="18" draw:name="Contrôle 44" draw:style-name="gr6" draw:text-style-name="P9" svg:width="13.327cm" svg:height="2.08cm" draw:control="control17"/><draw:control text:anchor-type="as-char" svg:y="-0.328cm" draw:z-index="19" draw:name="Contrôle 45" draw:style-name="gr6" draw:text-style-name="P24" svg:width="13.327cm" svg:height="0.518cm" draw:control="control18"/><draw:control text:anchor-type="as-char" svg:y="-0.328cm" draw:z-index="20" draw:name="Contrôle 46" draw:style-name="gr6" draw:text-style-name="P9" svg:width="13.327cm" svg:height="2.08cm" draw:control="control19"/></text:p>
          </table:table-cell>
          <table:table-cell table:style-name="Tableau2.C2" office:value-type="string">
            <text:p text:style-name="P20">Effectif :</text:p>
            <text:p text:style-name="P28"><draw:control text:anchor-type="as-char" svg:y="-0.328cm" draw:z-index="3" draw:name="Contrôle 6" draw:style-name="gr6" draw:text-style-name="P9" svg:width="3.894cm" svg:height="2.768cm" draw:control="control2"/></text:p>
          </table:table-cell>
        </table:table-row>
        <table:table-row table:style-name="Tableau2.4">
          <table:covered-table-cell table:style-name="Tableau2.A2"/>
          <table:covered-table-cell table:style-name="Tableau2.A2"/>
          <table:table-cell table:style-name="Tableau2.C2" office:value-type="string">
            <text:p text:style-name="P29">Organisation et matériel :</text:p>
            <text:p text:style-name="P30"><draw:control text:anchor-type="as-char" svg:y="-0.328cm" draw:z-index="12" draw:name="Contrôle 7" draw:style-name="gr6" draw:text-style-name="P9" svg:width="3.894cm" svg:height="2.827cm" draw:control="control20"/></text:p>
          </table:table-cell>
        </table:table-row>
        <table:table-row>
          <table:covered-table-cell table:style-name="Tableau2.A2"/>
          <table:covered-table-cell table:style-name="Tableau2.A2"/>
          <table:table-cell table:style-name="Tableau2.C5" office:value-type="string">
            <text:p text:style-name="P31"><text:span text:style-name="T5">Pré-requis</text:span><text:span text:style-name="T3"> :</text:span></text:p>
            <text:p text:style-name="P32"><draw:control text:anchor-type="as-char" svg:y="-0.328cm" draw:z-index="13" draw:name="Contrôle 9" draw:style-name="gr6" draw:text-style-name="P9" svg:width="3.894cm" svg:height="2.897cm" draw:control="control12"/></text:p>
          </table:table-cell>
        </table:table-row>
        <table:table-row>
          <table:table-cell table:style-name="Tableau2.A2" office:value-type="string">
            <text:p text:style-name="P33">T<text:span text:style-name="T3">otal :</text:span></text:p>
            <text:p text:style-name="P34"><draw:control text:anchor-type="as-char" svg:y="-0.328cm" draw:z-index="22" draw:name="Contrôle 34" draw:style-name="gr6" draw:text-style-name="P22" svg:width="1.091cm" svg:height="0.518cm" draw:control="control21"/></text:p>
          </table:table-cell>
          <table:covered-table-cell table:style-name="Tableau2.A2"/>
          <table:table-cell table:style-name="Tableau2.C2" office:value-type="string">
            <text:p text:style-name="P31"/>
          </table:table-cell>
        </table:table-row>
      </table:table>
      <text:p text:style-name="P3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6">Retour sur la séance :</text:p>
            <text:p text:style-name="P37"><draw:control text:anchor-type="as-char" svg:y="-0.328cm" draw:z-index="4" draw:name="Contrôle 35" draw:style-name="gr6" draw:text-style-name="P22" svg:width="18.756cm" svg:height="3.497cm" draw:control="control3"/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ianne" svg:font-family="Marianne" style:font-family-generic="modern" style:font-pitch="variable"/>
    <style:font-face style:name="Marianne ExtraBold" svg:font-family="'Marianne ExtraBold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0:14:38.563297400</meta:creation-date>
    <dc:date>2026-05-19T22:18:08.241749300</dc:date>
    <meta:editing-duration>PT1H20M21S</meta:editing-duration>
    <meta:editing-cycles>26</meta:editing-cycles>
    <meta:generator>LibreOffice/25.8.6.1$Windows_X86_64 LibreOffice_project/85297ec6e49ec4e6faaa6f11880d49294fc70e60</meta:generator>
    <meta:print-date>2026-05-06T15:01:08.640197000</meta:print-date>
    <meta:printed-by>Fichiers PDF</meta:printed-by>
    <meta:document-statistic meta:table-count="3" meta:image-count="0" meta:object-count="0" meta:page-count="1" meta:paragraph-count="29" meta:word-count="44" meta:character-count="271" meta:non-whitespace-character-count="213"/>
  </office:meta>
</office:document-meta>
</file>